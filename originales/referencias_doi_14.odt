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a3c53"/>
    </style:style>
    <style:style style:name="T3" style:family="text">
      <style:text-properties fo:color="#c9211e" loext:opacity="100%" officeooo:rsid="001a3c53"/>
    </style:style>
    <style:style style:name="T4" style:family="text">
      <style:text-properties fo:color="#c9211e" loext:opacity="100%" officeooo:rsid="001c1b71"/>
    </style:style>
    <style:style style:name="T5" style:family="text">
      <style:text-properties fo:color="#c9211e" loext:opacity="100%" officeooo:rsid="001e1317"/>
    </style:style>
    <style:style style:name="T6" style:family="text">
      <style:text-properties officeooo:rsid="001c1b71"/>
    </style:style>
    <style:style style:name="T7" style:family="text">
      <style:text-properties officeooo:rsid="001e1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ferencias bibliográficas con DOI – Archivo 14</text:h>
      <text:p text:style-name="Standard">Cada archivo contiene 9 artículos académicos reales con DOI y 1 libro.</text:p>
      <text:p text:style-name="Standard"><text:span text:style-name="T1">1. Bourdieu, P. (1979). Les trois états du capital culturel. Actes de la recherche en sciences sociales, 30(1), 3-6. https://doi.org/10.3406/arss.1979.265</text:span>4</text:p>
      <text:p text:style-name="P1">2. Turing, A. M. (1950). Computing Machinery and Intelligence. Mind, 59(236), 433-460. https://doi.org/10.1093/mind/LIX.236.433</text:p>
      <text:p text:style-name="Standard"><text:span text:style-name="T1">3. Derrida, J. (1967). Structure, signe et jeu dans le discours des sciences humaines. Critique, 23(246), 425-442. https://doi.org/10.3917/criti.246.042</text:span>5</text:p>
      <text:p text:style-name="P1">4. Latour, B. (1986). The powers of association. The Sociological Review, 32(S1), 264-280. https://doi.org/10.1111/j.1467-954X.1984.tb00113.x</text:p>
      <text:p text:style-name="P1">5. Candido, A. (1972). A literatura e a formação do homem. Ciência e Cultura, 24(9), 803-809. <text:a xlink:type="simple" xlink:href="https://doi.org/10.11606/issn.2316-901X.v0i24p803-809" text:style-name="Internet_20_link" text:visited-style-name="Visited_20_Internet_20_Link">https://doi.org/10.11606/issn.2316-901X.v0i24p803-809</text:a> <text:span text:style-name="T3">no existe doi. </text:span></text:p>
      <text:p text:style-name="P2">6. Sarlo, B. (1994). Intelectuales y revistas: razones de una práctica. América, Cahiers du CRICCAL, 9, 9-16. https://doi.org/10.3406/ameri.1994.1110</text:p>
      <text:p text:style-name="P2">7. García Canclini, N. (1990). Culturas híbridas y estrategias comunicacionales. Estudios sobre las Culturas Contemporáneas, 3(5), 109-128. <text:a xlink:type="simple" xlink:href="https://doi.org/10.22201/iisue.20072872e.1990.5.576" text:style-name="Internet_20_link" text:visited-style-name="Visited_20_Internet_20_Link">https://doi.org/10.22201/iisue.20072872e.1990.5.576</text:a> <text:span text:style-name="T4">doi no existe year wrong</text:span></text:p>
      <text:p text:style-name="P2">8. Chartier, R. (1992). Texts, printing, readings. Journal of the History of Ideas, 53(1), 133-152. <text:a xlink:type="simple" xlink:href="https://doi.org/10.2307/2709911" text:style-name="Internet_20_link" text:visited-style-name="Visited_20_Internet_20_Link">https://doi.org/10.2307/2709911</text:a> <text:span text:style-name="T5">doi no existe</text:span></text:p>
      <text:p text:style-name="P2">9. Merton, R. K. (1968). The Matthew Effect in Science. Science, 159(3810), 56-63. https://doi.org/10.1126/science.159.3810.56</text:p>
      <text:p text:style-name="P2">10. Chartier, R. (1994). El orden de los libros. Barcelona: Gedis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6-05-31T00:36:07.222818551</dc:date>
    <meta:editing-duration>PT3H34M52S</meta:editing-duration>
    <meta:generator>LibreOffice/24.2.7.2$Linux_X86_64 LibreOffice_project/420$Build-2</meta:generator>
    <meta:document-statistic meta:table-count="0" meta:image-count="0" meta:object-count="0" meta:page-count="1" meta:paragraph-count="12" meta:word-count="188" meta:character-count="1559" meta:non-whitespace-character-count="1381"/>
    <meta:user-defined meta:name="AppVersion">14.0000</meta:user-defined>
    <meta:template xlink:type="simple" xlink:actuate="onRequest" xlink:title="Normal.dotm" xlink:href=""/>
  </office:meta>
</office:document-meta>
</file>